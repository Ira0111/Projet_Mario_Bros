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15a071" officeooo:paragraph-rsid="0015a071"/>
    </style:style>
    <style:style style:name="P2" style:family="paragraph" style:parent-style-name="Standard">
      <style:text-properties officeooo:rsid="001543a1" officeooo:paragraph-rsid="001543a1"/>
    </style:style>
    <style:style style:name="P3" style:family="paragraph" style:parent-style-name="Standard">
      <style:text-properties officeooo:rsid="00170f3b" officeooo:paragraph-rsid="00170f3b"/>
    </style:style>
    <style:style style:name="T1" style:family="text">
      <style:text-properties officeooo:rsid="001a11dd"/>
    </style:style>
    <style:style style:name="T2" style:family="text">
      <style:text-properties officeooo:rsid="001af2fb"/>
    </style:style>
    <style:style style:name="T3" style:family="text">
      <style:text-properties fo:color="#7fcbc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cran <text:span text:style-name="T1">(a changer)</text:span></text:p>
      <text:p text:style-name="P2"/>
      <text:p text:style-name="P2">GND au GND</text:p>
      <text:p text:style-name="P2">VCC a 3V3</text:p>
      <text:p text:style-name="P2">CLK a 18</text:p>
      <text:p text:style-name="P2">MOSI a 23</text:p>
      <text:p text:style-name="P2">RES a <text:span text:style-name="T1">21</text:span></text:p>
      <text:p text:style-name="P2">DC a <text:span text:style-name="T1">22</text:span></text:p>
      <text:p text:style-name="P2">BLK a 3V3</text:p>
      <text:p text:style-name="P2">MISO a 19</text:p>
      <text:p text:style-name="P2"/>
      <text:p text:style-name="P3">bouton</text:p>
      <text:p text:style-name="P3"/>
      <text:p text:style-name="P3">BTN_LEFT <text:span text:style-name="T1">15</text:span></text:p>
      <text:p text:style-name="P3">BTN_RIGHT <text:span text:style-name="T1">4</text:span></text:p>
      <text:p text:style-name="P3">BTN_UP 1<text:span text:style-name="T1">7</text:span></text:p>
      <text:p text:style-name="P3">BTN_DOWN <text:span text:style-name="T1">5</text:span></text:p>
      <text:p text:style-name="P3"/>
      <text:p text:style-name="P3">buzzer</text:p>
      <text:p text:style-name="P3"/>
      <text:p text:style-name="P3">BUZZER_PIN <text:span text:style-name="T2">25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0:10:18.820848500</meta:creation-date>
    <dc:date>2026-04-14T18:17:47.895033600</dc:date>
    <meta:editing-duration>PT4H58M15S</meta:editing-duration>
    <meta:editing-cycles>4</meta:editing-cycles>
    <meta:generator>LibreOffice/26.2.1.2$Windows_X86_64 LibreOffice_project/620$Build-2</meta:generator>
    <meta:document-statistic meta:table-count="0" meta:image-count="0" meta:object-count="0" meta:page-count="1" meta:paragraph-count="16" meta:word-count="39" meta:character-count="152" meta:non-whitespace-character-count="129"/>
  </office:meta>
</office:document-meta>
</file>