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15a071" officeooo:paragraph-rsid="0015a071"/>
    </style:style>
    <style:style style:name="P2" style:family="paragraph" style:parent-style-name="Standard">
      <style:text-properties officeooo:rsid="001543a1" officeooo:paragraph-rsid="001543a1"/>
    </style:style>
    <style:style style:name="P3" style:family="paragraph" style:parent-style-name="Standard">
      <style:text-properties officeooo:rsid="00170f3b" officeooo:paragraph-rsid="00170f3b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a11dd"/>
    </style:style>
    <style:style style:name="T2" style:family="text">
      <style:text-properties officeooo:rsid="001af2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cran <text:span text:style-name="T1">(a changer)</text:span></text:p>
      <text:p text:style-name="P2"/>
      <text:p text:style-name="P2">GND au GND</text:p>
      <text:p text:style-name="P2">VCC a 3V3</text:p>
      <text:p text:style-name="P2">CLK a 18</text:p>
      <text:p text:style-name="P2">MOSI a 23</text:p>
      <text:p text:style-name="P2">RES a <text:span text:style-name="T1">21</text:span></text:p>
      <text:p text:style-name="P2">DC a <text:span text:style-name="T1">22</text:span></text:p>
      <text:p text:style-name="P2">BLK a 3V3</text:p>
      <text:p text:style-name="P2">MISO a 19</text:p>
      <text:p text:style-name="P2"/>
      <text:p text:style-name="P3">bouton</text:p>
      <text:p text:style-name="P3"/>
      <text:p text:style-name="P3">BTN_LEFT <text:span text:style-name="T1">15</text:span></text:p>
      <text:p text:style-name="P3">BTN_RIGHT <text:span text:style-name="T1">4</text:span></text:p>
      <text:p text:style-name="P3">BTN_UP 1<text:span text:style-name="T1">7</text:span></text:p>
      <text:p text:style-name="P3">BTN_DOWN <text:span text:style-name="T1">5</text:span></text:p>
      <text:p text:style-name="P3"/>
      <text:p text:style-name="P3">buzzer</text:p>
      <text:p text:style-name="P3"/>
      <text:p text:style-name="P3">BUZZER_PIN <text:span text:style-name="T2">25</text:span></text:p>
      <text:p text:style-name="Standard"/>
      <text:p text:style-name="Standard"/>
      <text:p text:style-name="Standard"/>
      <text:p text:style-name="P4">code :</text:p>
      <text:p text:style-name="Text_20_body">#include &lt;TFT_eSPI.h&gt; // Bibliothèque pour l'écran #include &lt;SPI.h&gt; <text:s text:c="5"/>// Pour la communication SPI #include &lt;FS.h&gt; <text:s text:c="6"/>// Système de fichiers #ifdef ESP32 #include "LittleFS.h" // Utiliser LittleFS pour ESP32 (plus moderne que SPIFFS) #else #include &lt;SD.h&gt; #endif</text:p>
      <text:p text:style-name="Text_20_body">// --- Définition des broches Écran (déjà dans User_Setup.h, mais on peut forcer ici si besoin) --- // TFT_eSPI utilise les définitions de User_Setup.h par défaut.</text:p>
      <text:p text:style-name="Text_20_body">TFT_eSPI tft = TFT_eSPI(); // Objet écran</text:p>
      <text:p text:style-name="Text_20_body">// --- Définition des broches Boutons --- #define BTN_LEFT <text:s/>15 #define BTN_RIGHT 4 #define BTN_UP <text:s text:c="3"/>17 #define BTN_DOWN <text:s/>5</text:p>
      <text:p text:style-name="Text_20_body">// --- Définition du Buzzer --- #define BUZZER_PIN 25</text:p>
      <text:p text:style-name="Text_20_body">// --- Variables pour le debounce des boutons --- unsigned long lastDebounceTime = 0; const unsigned long debounceDelay = 50; // ms</text:p>
      <text:p text:style-name="Text_20_body">void setup() { Serial.begin(115200);</text:p>
      <text:p text:style-name="Text_20_body">// Initialisation du système de fichiers if (!LittleFS.begin()) { Serial.println("Erreur: LittleFS n'a pas pu démarrer !"); return; }</text:p>
      <text:p text:style-name="Text_20_body">// Initialisation de l'écran tft.init(); tft.setRotation(1); // Rotation : 0, 1, 2 ou 3 selon votre montage tft.fillScreen(TFT_BLACK);</text:p>
      <text:p text:style-name="Text_20_body">Serial.println("Écran initialisé.");</text:p>
      <text:p text:style-name="Text_20_body">// Configuration des boutons (mode INPUT_PULLUP si les boutons sont reliés à GND) pinMode(BTN_LEFT, INPUT_PULLUP); pinMode(BTN_RIGHT, <text:soft-page-break/>INPUT_PULLUP); pinMode(BTN_UP, INPUT_PULLUP); pinMode(BTN_DOWN, INPUT_PULLUP);</text:p>
      <text:p text:style-name="Text_20_body">// Configuration du buzzer pinMode(BUZZER_PIN, OUTPUT);</text:p>
      <text:p text:style-name="Text_20_body">// Afficher un message de démarrage tft.setTextDatum(MC_DATUM); // Centrage milieu centre tft.setTextSize(2); tft.setTextColor(TFT_WHITE, TFT_BLACK); tft.drawString("Chargement...", TFT_WIDTH/2, TFT_HEIGHT/2);</text:p>
      <text:p text:style-name="Text_20_body">// Petite pause pour voir le message delay(1000);</text:p>
      <text:p text:style-name="Text_20_body">// Effacer l'écran avant d'afficher l'image tft.fillScreen(TFT_BLACK); }</text:p>
      <text:p text:style-name="Text_20_body">void loop() { static int imageOffsetX = 0; // Pour déplacer l'image avec les boutons static int imageOffsetY = 0;</text:p>
      <text:p text:style-name="Text_20_body">// --- Gestion des Boutons --- unsigned long currentTime = millis();</text:p>
      <text:p text:style-name="Text_20_body">if (currentTime - lastDebounceTime &gt; debounceDelay) { lastDebounceTime = currentTime;</text:p>
      <text:p text:style-name="P5">// Vérifier chaque bouton (LOW signifie appuyé car INPUT_PULLUP)<text:line-break/>if (digitalRead(BTN_LEFT) == LOW) {<text:line-break/> <text:s/>imageOffsetX -= 10;<text:line-break/> <text:s/>playBuzzer(200, 100); // Bip court<text:line-break/> <text:s/>Serial.println("Gauche");<text:line-break/>}<text:line-break/>else if (digitalRead(BTN_RIGHT) == LOW) {<text:line-break/> <text:s/>imageOffsetX += 10;<text:line-break/> <text:s/>playBuzzer(200, 100);<text:line-break/> <text:s/>Serial.println("Droite");<text:line-break/>}<text:line-break/>else if (digitalRead(BTN_UP) == LOW) {<text:line-break/> <text:s/>imageOffsetY -= 10;<text:line-break/> <text:s/>playBuzzer(200, 100);<text:line-break/> <text:s/>Serial.println("Haut");<text:line-break/>}<text:line-break/>else if (digitalRead(BTN_DOWN) == LOW) {<text:line-break/> <text:s/>imageOffsetY += 10;<text:line-break/> <text:s/>playBuzzer(200, 100);<text:line-break/> <text:s/>Serial.println("Bas");<text:line-break/>}<text:line-break/><text:line-break/>// Limiter les déplacements pour ne pas sortir de l'écran (optionnel, à ajuster selon taille image)<text:line-break/>if (imageOffsetX &lt; 0) imageOffsetX = 0;<text:line-break/>if (imageOffsetY &lt; 0) imageOffsetY =</text:p>
      <text:p text:style-name="Text_20_body">#include &lt;TFT_eSPI.h&gt; // Bibliothèque pour l'écran #include &lt;SPI.h&gt; <text:s text:c="5"/>// Pour la communication SPI</text:p>
      <text:p text:style-name="Text_20_body">// --- Définition des broches Boutons --- #define BTN_LEFT <text:s/>15 #define BTN_RIGHT 4 #define BTN_UP <text:s text:c="3"/>17 #define BTN_DOWN <text:s/>5</text:p>
      <text:p text:style-name="Text_20_body">// --- Définition du Buzzer --- #define BUZZER_PIN 25</text:p>
      <text:p text:style-name="Text_20_body">TFT_eSPI tft = TFT_eSPI(); // Objet écran</text:p>
      <text:p text:style-name="Text_20_body">// Variables pour le debounce des boutons unsigned long lastDebounceTime = 0; const unsigned long debounceDelay = 50; // ms</text:p>
      <text:p text:style-name="Text_20_body"><text:soft-page-break/>// Variables de position de l'image int posX = 0; int posY = 0;</text:p>
      <text:p text:style-name="Text_20_body">// --- FONCTION BUZZER --- void playBuzzer(int frequency, int duration) { tone(BUZZER_PIN, frequency); // Émet un son à la fréquence donnée delay(duration); <text:s text:c="12"/>// Durée du son en ms noTone(BUZZER_PIN); <text:s text:c="9"/>// Arrête le son }</text:p>
      <text:p text:style-name="Text_20_body">// --- FONCTION POUR AFFICHER L'IMAGE --- // Remplacez cette fonction par l'appel au tableau généré par Image2cpp void drawImage() { // Exemple si vous utilisez un tableau C nommé 'mon_image' avec dimensions WxH // tft.drawBitmap(posX, posY, mon_image, largeur_img, hauteur_img);</text:p>
      <text:p text:style-name="Text_20_body">// Pour l'instant, on dessine un rectangle blanc pour simuler l'image et tester les boutons tft.fillRect(posX, posY, 100, 100, TFT_WHITE); tft.drawCircle(posX + 50, posY + 50, 40, TFT_RED); }</text:p>
      <text:p text:style-name="Text_20_body">void setup() { Serial.begin(115200);</text:p>
      <text:p text:style-name="Text_20_body">// Initialisation de l'écran tft.init(); tft.setRotation(1); // Ajustez la rotation (0-3) selon votre montage physique tft.fillScreen(TFT_BLACK);</text:p>
      <text:p text:style-name="Text_20_body">Serial.println("Écran initialisé.");</text:p>
      <text:p text:style-name="Text_20_body">// Configuration des boutons (mode INPUT_PULLUP si les boutons sont reliés à GND) // Si vos boutons ont une résistance de pull-up externe, mettez INPUT. pinMode(BTN_LEFT, INPUT_PULLUP); pinMode(BTN_RIGHT, INPUT_PULLUP); pinMode(BTN_UP, INPUT_PULLUP); pinMode(BTN_DOWN, INPUT_PULLUP);</text:p>
      <text:p text:style-name="Text_20_body">// Configuration du buzzer pinMode(BUZZER_PIN, OUTPUT);</text:p>
      <text:p text:style-name="Text_20_body">// Afficher un message de démarrage tft.setTextDatum(MC_DATUM); // Centrage milieu centre tft.setTextSize(2); tft.setTextColor(TFT_WHITE, TFT_BLACK); tft.drawString("Prêt", TFT_WIDTH/2, TFT_HEIGHT/2);</text:p>
      <text:p text:style-name="Text_20_body">delay(1000); tft.fillScreen(TFT_BLACK);</text:p>
      <text:p text:style-name="Text_20_body">// Position initiale au centre (ex: image de 100x100) posX = (tft.width() - 100) / 2; posY = (tft.height() - 100) / 2; }</text:p>
      <text:p text:style-name="Text_20_body">void loop() { unsigned long currentTime = millis();</text:p>
      <text:p text:style-name="Text_20_body">// Gestion du debounce pour éviter les rebonds des boutons if (currentTime - lastDebounceTime &gt; debounceDelay) { lastDebounceTime = currentTime;</text:p>
      <text:p text:style-name="P5">bool moved = false;<text:line-break/><text:line-break/>// Vérifier chaque bouton (LOW signifie appuyé car INPUT_PULLUP)<text:line-break/>if (digitalRead(BTN_LEFT) == LOW) {<text:line-break/> <text:s/>posX -= 10;<text:line-break/> <text:s/>moved = true;<text:line-break/> <text:s/>playBuzzer(300, 50); <text:line-break/>}<text:line-break/>else if (digitalRead(BTN_RIGHT) == LOW) {<text:line-break/> <text:s/>posX += 10;<text:line-break/> <text:s/>moved = true;<text:line-break/> <text:s/>playBuzzer(300, 50);<text:line-break/>}<text:line-break/>else if (digitalRead(BTN_UP) == LOW) {<text:line-break/> <text:s/>posY -= 10;<text:line-break/><text:soft-page-break/> <text:s/>moved = true;<text:line-break/> <text:s/>playBuzzer(400, 50);<text:line-break/>}<text:line-break/>else if (digitalRead(BTN_DOWN) == LOW) {<text:line-break/> <text:s/>posY += 10;<text:line-break/> <text:s/>moved = true;<text:line-break/> <text:s/>playBuzzer(200, 50);<text:line-break/>}<text:line-break/><text:line-break/>// Limiter les déplacements pour ne pas sortir de l'écran<text:line-break/>// Supposons que l'image fait 100x100 pixels. Ajustez selon la taille réelle de votre image.<text:line-break/>int imgWidth = 100; <text:line-break/>int imgHeight = 100;<text:line-break/><text:line-break/>if (posX &lt; 0) posX = 0;<text:line-break/>if (posY &lt; 0) posY = 0;<text:line-break/>if (posX &gt; tft.width() - imgWidth) posX = tft.width() - imgWidth;<text:line-break/>if (posY &gt; tft.height() - imgHeight) posY = tft.height() - imgHeight;<text:line-break/><text:line-break/>// Si une touche a été pressée, on redessine tout l'écran<text:line-break/>if (moved) {<text:line-break/> <text:s/>tft.fillScreen(TFT_BLACK); // Efface l'ancien position<text:line-break/> <text:s/>drawImage(); <text:s text:c="14"/>// Dessine à la nouvelle position<text:line-break/>}</text:p>
      <text:p text:style-name="Text_20_body">} 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0:10:18.820848500</meta:creation-date>
    <dc:date>2026-05-18T18:08:25.726296900</dc:date>
    <meta:editing-duration>PT5H15M24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4" meta:paragraph-count="57" meta:word-count="882" meta:character-count="6212" meta:non-whitespace-character-count="5267"/>
  </office:meta>
</office:document-meta>
</file>